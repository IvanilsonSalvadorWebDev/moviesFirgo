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500000279AED9E971C8795DB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4c44e" officeooo:paragraph-rsid="0004c44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4c44e" officeooo:paragraph-rsid="000bda3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4c44e" officeooo:paragraph-rsid="0004c44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4c44e" officeooo:paragraph-rsid="0004c44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4c44e" officeooo:paragraph-rsid="0004c44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4c44e" officeooo:paragraph-rsid="0004c44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4c44e" officeooo:paragraph-rsid="0004c44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4c44e" officeooo:paragraph-rsid="000bda3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4c44e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officeooo:rsid="0004c44e" officeooo:paragraph-rsid="0004c44e" style:font-size-asian="10.5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officeooo:rsid="0004c44e" officeooo:paragraph-rsid="0004c44e" style:font-size-asian="10.5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bold" officeooo:rsid="0004c44e" officeooo:paragraph-rsid="0004c44e" style:font-size-asian="10.5pt" style:font-weight-asian="bold" style:font-size-complex="12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bold" officeooo:rsid="0004c44e" officeooo:paragraph-rsid="0004c44e" style:font-size-asian="10.5pt" style:font-weight-asian="bold" style:font-size-complex="12pt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weight="normal" officeooo:rsid="0004c44e" officeooo:paragraph-rsid="0004c44e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fo:font-weight="normal" officeooo:rsid="0004c44e" officeooo:paragraph-rsid="0004c44e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weight="normal" officeooo:rsid="0004c44e" officeooo:paragraph-rsid="000bda3a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font-weight="normal" officeooo:rsid="0004c44e" officeooo:paragraph-rsid="00183628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2pt" fo:font-weight="normal" officeooo:rsid="000c2673" officeooo:paragraph-rsid="000c2673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normal" officeooo:rsid="000c2673" officeooo:paragraph-rsid="000f0a7e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weight="normal" officeooo:rsid="00183628" officeooo:paragraph-rsid="0018362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4c44e" officeooo:paragraph-rsid="0004c44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04c44e" officeooo:paragraph-rsid="00183628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officeooo:rsid="0004c44e" style:font-size-asian="14pt" style:font-weight-asian="normal" style:font-size-complex="14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c9211e" loext:opacity="100%" style:font-size-asian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4c44e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71f0" style:font-weight-asian="bold" style:font-weight-complex="bold"/>
    </style:style>
    <style:style style:name="T12" style:family="text">
      <style:text-properties fo:font-weight="bold" officeooo:rsid="000c2673" style:font-weight-asian="bold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f10d0c" loext:opacity="100%"/>
    </style:style>
    <style:style style:name="T15" style:family="text">
      <style:text-properties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T16" style:family="text">
      <style:text-properties style:text-line-through-style="none" style:text-line-through-type="none" style:font-name="Liberation Serif" fo:font-size="12pt" style:text-underline-style="none" fo:font-weight="normal" style:text-blinking="false" loext:padding="0cm" loext:border="none"/>
    </style:style>
    <style:style style:name="T17" style:family="text">
      <style:text-properties style:text-line-through-style="none" style:text-line-through-type="none" style:font-name="Liberation Serif" fo:font-size="12pt" style:text-underline-style="none" fo:font-weight="normal" officeooo:rsid="0004c44e" style:text-blinking="false" loext:padding="0cm" loext:border="none"/>
    </style:style>
    <style:style style:name="T18" style:family="text">
      <style:text-properties officeooo:rsid="0005d589"/>
    </style:style>
    <style:style style:name="T19" style:family="text">
      <style:text-properties officeooo:rsid="0006e2a1"/>
    </style:style>
    <style:style style:name="T20" style:family="text">
      <style:text-properties officeooo:rsid="0008dd89"/>
    </style:style>
    <style:style style:name="T21" style:family="text">
      <style:text-properties officeooo:rsid="000bda3a"/>
    </style:style>
    <style:style style:name="T22" style:family="text">
      <style:text-properties officeooo:rsid="000c2673"/>
    </style:style>
    <style:style style:name="T23" style:family="text">
      <style:text-properties officeooo:rsid="00117f1b"/>
    </style:style>
    <style:style style:name="T24" style:family="text">
      <style:text-properties officeooo:rsid="00150e96"/>
    </style:style>
    <style:style style:name="T25" style:family="text">
      <style:text-properties officeooo:rsid="00158637"/>
    </style:style>
    <style:style style:name="T26" style:family="text">
      <style:text-properties officeooo:rsid="00172811"/>
    </style:style>
    <style:style style:name="T27" style:family="text">
      <style:text-properties officeooo:rsid="001836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istema de Filmes Tall - Mvp</text:p>
      <text:p text:style-name="P5"/>
      <text:p text:style-name="P5"><text:s/><text:span text:style-name="T1">Essa documentação aborda sobre o processo de desenvolvimento da plataforma de filmes tall. O objetivo e criar uma plataforma de filmes que permita aos usuários alugar filmes por um período de tempo e um certo horário do dia ou um ou mais dias. </text:span></text:p>
      <text:p text:style-name="P5"><draw:frame draw:style-name="fr1" draw:name="Imagem1" text:anchor-type="char" svg:x="0cm" svg:y="0.439cm" svg:width="17cm" svg:height="7.883cm" draw:z-index="0"><draw:image xlink:href="Pictures/100000010000055500000279AED9E971C8795DBB.png" xlink:type="simple" xlink:show="embed" xlink:actuate="onLoad" draw:mime-type="image/png"/></draw:frame></text:p>
      <text:p text:style-name="P5"/>
      <text:p text:style-name="P5">O que eles podem fazer na plataforma</text:p>
      <text:list xml:id="list2149347357" text:style-name="L1">
        <text:list-item>
          <text:p text:style-name="P10">Navegar no catalogo</text:p>
        </text:list-item>
        <text:list-item>
          <text:p text:style-name="P10">Pesquisar filmes</text:p>
        </text:list-item>
        <text:list-item>
          <text:p text:style-name="P10">Ver detalhes de filmes</text:p>
        </text:list-item>
        <text:list-item>
          <text:p text:style-name="P10">Adicionar filmes ao carrinho</text:p>
        </text:list-item>
        <text:list-item>
          <text:p text:style-name="P10">Ver filmes alugados ou comprados </text:p>
        </text:list-item>
        <text:list-item>
          <text:p text:style-name="P10">Alugar filmes </text:p>
        </text:list-item>
        <text:list-item>
          <text:p text:style-name="P10">Fazer pagamentos</text:p>
        </text:list-item>
        <text:list-item>
          <text:p text:style-name="P10">Gerir perfil</text:p>
        </text:list-item>
        <text:list-item>
          <text:p text:style-name="P10">Eliminar conta</text:p>
          <text:p text:style-name="P10"/>
        </text:list-item>
      </text:list>
      <text:p text:style-name="P5">O que o sistema deve fazer?</text:p>
      <text:list text:style-name="L2">
        <text:list-item>
          <text:p text:style-name="P11">Listar filmes</text:p>
        </text:list-item>
        <text:list-item>
          <text:p text:style-name="P11">Permitir ao usuário pesquisar filmes por letra, data ou <text:s/></text:p>
        </text:list-item>
        <text:list-item>
          <text:p text:style-name="P11">Exibir categorias de filmes principais </text:p>
        </text:list-item>
        <text:list-item>
          <text:p text:style-name="P11">Criar uma conta </text:p>
        </text:list-item>
        <text:list-item>
          <text:p text:style-name="P11">logar no sistema </text:p>
        </text:list-item>
        <text:list-item>
          <text:p text:style-name="P11">exibir informações de usuário logado</text:p>
        </text:list-item>
      </text:list>
      <text:p text:style-name="P5"/>
      <text:p text:style-name="P5"/>
      <text:p text:style-name="P6"><text:span text:style-name="T2">Fluxo de usuário</text:span> </text:p>
      <text:p text:style-name="P5">Case 1 - User:</text:p>
      <text:list xml:id="list2161893347" text:style-name="L3">
        <text:list-item>
          <text:p text:style-name="P12">Entra pela Web =&gt; <text:s/>Acessa Url <text:span text:style-name="T7">no browser desktop ou mobile.</text:span></text:p>
        </text:list-item>
        <text:list-item>
          <text:p text:style-name="P12">Navega pelo catálogo =&gt; <text:span text:style-name="T14">Lista de filmes por categorias na home</text:span></text:p>
        </text:list-item>
        <text:list-item>
          <text:p text:style-name="P12">Clica num filme (card) =&gt;<text:span text:style-name="T7">Sistema retorna o conteúdo do filme no main por rota ou chama outra page.</text:span></text:p>
        </text:list-item>
        <text:list-item>
          <text:p text:style-name="P12"><text:soft-page-break/>Clica no botao add to Cart =&gt; <text:span text:style-name="T7">Sistema cria a sessão Cart e adiciona o filme ao Cart object</text:span><text:span text:style-name="T6">, (o sistema também deve fazer incremento dos dias caso aja mais de um click no botao na pagina de detalhes).</text:span></text:p>
        </text:list-item>
        <text:list-item>
          <text:p text:style-name="P12">Clica no ícone do carrinho <text:s/>=&gt; <text:span text:style-name="T5">Sistema exibe o carrinho de compras com o filme adicionado dentro</text:span></text:p>
        </text:list-item>
        <text:list-item>
          <text:p text:style-name="P12">Clica no botao continuar compra =&gt; <text:span text:style-name="T5">Sistema exibe mensagem de login e chama o formulário </text:span><text:span text:style-name="T13">só depois </text:span><text:span text:style-name="T5">chama rota de Checkout e exibe informacoes de usuário logado e dos filmes e pagamento.</text:span></text:p>
        </text:list-item>
        <text:list-item>
          <text:p text:style-name="P12">Clica em finalizar compra =&gt; <text:span text:style-name="T5">Sistema verifica o método de pagamento, exibe mensagem de </text:span><text:span text:style-name="T13">adicione um método de pagamento se estiver vazio</text:span><text:span text:style-name="T5"> e chama a rota de formulario de pagaamento, </text:span><text:span text:style-name="T13">só depois </text:span><text:span text:style-name="T5">finaliza a </text:span><text:span text:style-name="T13">compra e limpa a sessäo checkout.</text:span></text:p>
        </text:list-item>
        <text:list-item>
          <text:p text:style-name="P12"/>
        </text:list-item>
      </text:list>
      <text:list xml:id="list210601201000773" text:continue-list="list2149347357" text:style-name="L1">
        <text:list-header>
          <text:p text:style-name="P10"/>
        </text:list-header>
      </text:list>
      <text:p text:style-name="P5">Case 2 - User:</text:p>
      <text:list xml:id="list210601423496337" text:continue-list="list2161893347" text:style-name="L3">
        <text:list-item>
          <text:p text:style-name="P12">Entra pela Web =&gt; <text:s/>Acessa Url <text:span text:style-name="T7">no browser desktop ou mobile.</text:span></text:p>
        </text:list-item>
        <text:list-item>
          <text:p text:style-name="P12">Navega pelo catálogo =&gt; <text:span text:style-name="T14">Lista de filmes por categorias na home</text:span></text:p>
        </text:list-item>
        <text:list-item>
          <text:p text:style-name="P12">Clica no botao (button) =&gt; Sistema adiciona o filme ao cart<text:span text:style-name="T7"> <text:s/>e atualiza o contador na navegacao.</text:span></text:p>
        </text:list-item>
        <text:list-item>
          <text:p text:style-name="P12">Clica no botao add to Cart =&gt; <text:span text:style-name="T7">Sistema cria a sessão Cart e adiciona o filme ao Cart object</text:span><text:span text:style-name="T6">, (o sistema também deve fazer incremento dos dias caso e atualização de preços caso aja mais de um click no botao na home).</text:span></text:p>
        </text:list-item>
        <text:list-item>
          <text:p text:style-name="P12">Clica no ícone do carrinho <text:s/>=&gt; <text:span text:style-name="T5">Sistema exibe o carrinho de compras com o filme adicionado dentro</text:span></text:p>
        </text:list-item>
        <text:list-item>
          <text:p text:style-name="P12">Clica no botao continuar compra =&gt; <text:span text:style-name="T5">Sistema exibe mensagem de login e chama o formulário </text:span><text:span text:style-name="T13">só depois </text:span><text:span text:style-name="T5">chama rota de Checkout e exibe informações de usuário logado e dos filmes e pagamento.</text:span></text:p>
        </text:list-item>
        <text:list-item>
          <text:p text:style-name="P12">Clica em finalizar compra =&gt; <text:span text:style-name="T5">Sistema verifica o método de pagamento, exibe mensagem de </text:span><text:span text:style-name="T13">adicione um método de pagamento se estiver vazio</text:span><text:span text:style-name="T5"> e chama a rota de formulário de pagamento, </text:span><text:span text:style-name="T13">só depois </text:span><text:span text:style-name="T5">finaliza a </text:span><text:span text:style-name="T13">compra e limpa a sessäo checkout</text:span></text:p>
        </text:list-item>
        <text:list-item>
          <text:p text:style-name="P12">e salva um historico dessa compra</text:p>
        </text:list-item>
      </text:list>
      <text:p text:style-name="P5"/>
      <text:p text:style-name="P5"/>
      <text:p text:style-name="P3">Organização do sistema</text:p>
      <text:p text:style-name="P9"><text:span text:style-name="T9">O sistema está organizado em Features</text:span><text:span text:style-name="T3">, </text:span><text:span text:style-name="T9">porque essa estrutura permite a organização do sistema em módulos pequenos, o que permite separar as funcionalidades em partes distintas e mais Gerenciáveis, o que facilita a manutenção do sistema ao longo prazo. É possivel criar </text:span><text:span text:style-name="T16">um modelo global do sistema, lista</text:span><text:span text:style-name="T17">r</text:span><text:span text:style-name="T16"> todas as funcionalidades e depois planea</text:span><text:span text:style-name="T17">r</text:span><text:span text:style-name="T16"> o desenvolvimento por cada uma delas.</text:span></text:p>
      <text:list text:style-name="L4">
        <text:list-header>
          <text:p text:style-name="P13"/>
        </text:list-header>
      </text:list>
      <text:p text:style-name="P1">Modulo gestaoDeUsuário</text:p>
      <text:p text:style-name="P9"><text:span text:style-name="T9">Este será responsável por gerenciar tudo sobre o usuário do sistema, criar as contas, validar e autenticar usuários no sistema, retornar informações. </text:span>Criar, editar, desativar ou reativar usuários.</text:p>
      <text:p text:style-name="P9"><text:span text:style-name="Strong_20_Emphasis"><text:span text:style-name="T15">Controle de Acesso:</text:span></text:span> Definir níveis de acesso baseados em funções (gerente, analista, etc.).</text:p>
      <text:p text:style-name="P7"/>
      <text:p text:style-name="P7">Funcionalidades: </text:p>
      <text:list xml:id="list4193195119" text:style-name="L5">
        <text:list-item>
          <text:p text:style-name="P14">criarConta ()</text:p>
        </text:list-item>
        <text:list-item>
          <text:p text:style-name="P14">logarUser ()</text:p>
        </text:list-item>
        <text:list-item>
          <text:p text:style-name="P14">authUser ()</text:p>
        </text:list-item>
        <text:list-item>
          <text:p text:style-name="P14">deleteAccount ()</text:p>
        </text:list-item>
        <text:list-item>
          <text:p text:style-name="P14"/>
        </text:list-item>
      </text:list>
      <text:p text:style-name="P5"/>
      <text:p text:style-name="P5"/>
      <text:p text:style-name="P5"><text:soft-page-break/><text:span text:style-name="T2">Módulo gestaoDeFilmes</text:span></text:p>
      <text:p text:style-name="P7">Este será responsável por gerenciar tudo sobre o os filmes do sistema, criar as contas, validar e autenticar usuários no sistema, retornar informações, acessar objetos.</text:p>
      <text:p text:style-name="P7">Vamos usar imutáveis que não alteram o original, mas criam um novo.</text:p>
      <text:p text:style-name="P7"/>
      <text:p text:style-name="P7">Funcionalidades: </text:p>
      <text:list xml:id="list210601179573540" text:continue-numbering="true" text:style-name="L5">
        <text:list-item>
          <text:p text:style-name="P14">listarFilmes () =&gt; </text:p>
        </text:list-item>
        <text:list-item>
          <text:p text:style-name="P14">listarCategorias () =&gt; </text:p>
        </text:list-item>
        <text:list-item>
          <text:p text:style-name="P14">filtrarFilmes () =&gt;</text:p>
        </text:list-item>
        <text:list-item>
          <text:p text:style-name="P14">verDetalhesDeFilme () =&gt; </text:p>
        </text:list-item>
        <text:list-item>
          <text:p text:style-name="P14">mostrarFilmesComprados () =&gt; AINDA E NULL</text:p>
        </text:list-item>
        <text:list-item>
          <text:p text:style-name="P14">mostrarFilmesAlugados () =&gt; AINDA E NULL</text:p>
        </text:list-item>
        <text:list-item>
          <text:p text:style-name="P14">pesquisarFilmes () =&gt; <text:s/></text:p>
        </text:list-item>
      </text:list>
      <text:p text:style-name="P7"/>
      <text:p text:style-name="P1">Módulo gestaoDeCart</text:p>
      <text:p text:style-name="P7">Este será responsável por gerenciar tudo sobre o carrinho de compras, o sistema, recebe os filmes <text:span text:style-name="T27">adiciona ao carrinho de compras </text:span></text:p>
      <text:p text:style-name="P7"/>
      <text:p text:style-name="P7">Funcionalidades: </text:p>
      <text:list xml:id="list210602809854966" text:continue-numbering="true" text:style-name="L5">
        <text:list-item>
          <text:p text:style-name="P14">adicionarFilmesAoCart () =&gt; </text:p>
        </text:list-item>
        <text:list-item>
          <text:p text:style-name="P14">atualizarDiasDeAluguel () =&gt;</text:p>
        </text:list-item>
        <text:list-item>
          <text:p text:style-name="P14">atualizarPreco () =&gt; </text:p>
        </text:list-item>
      </text:list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">listarFilmes (arr){</text:p>
      <text:p text:style-name="P1">Inicio</text:p>
      <text:list xml:id="list2132139724" text:style-name="L6">
        <text:list-item>
          <text:p text:style-name="P15">Se o array for diferente de vazio</text:p>
        </text:list-item>
        <text:list-item>
          <text:p text:style-name="P15">Receber um array de objetos com filmes</text:p>
        </text:list-item>
        <text:list-item>
          <text:p text:style-name="P15">acessar os dados desse objecto com map(<text:span text:style-name="T18">callback</text:span>)</text:p>
        </text:list-item>
        <text:list-item>
          <text:p text:style-name="P15">pegar o id do container</text:p>
        </text:list-item>
        <text:list-item>
          <text:p text:style-name="P15">inserir esses dados no container</text:p>
        </text:list-item>
      </text:list>
      <text:p text:style-name="P7"/>
      <text:p text:style-name="P7"><text:span text:style-name="T10"><text:s/></text:span><text:span text:style-name="T4">Fim</text:span><text:span text:style-name="T10"> = &gt; Saida:</text:span> Lista de filme<text:span text:style-name="T4"> </text:span></text:p>
      <text:p text:style-name="P7"/>
      <text:p text:style-name="P1">listarCategorias(arr){</text:p>
      <text:p text:style-name="P1">Inicio<text:span text:style-name="T8"> </text:span></text:p>
      <text:list xml:id="list210601281834773" text:continue-numbering="true" text:style-name="L6">
        <text:list-item>
          <text:p text:style-name="P15">Receber um array de objetos com filmes</text:p>
        </text:list-item>
        <text:list-item>
          <text:p text:style-name="P15">acessar os dados <text:span text:style-name="T19">do objeto filme</text:span> com filter()</text:p>
        </text:list-item>
        <text:list-item>
          <text:p text:style-name="P15">selecionar todas as categorias disponiveis</text:p>
        </text:list-item>
        <text:list-item>
          <text:p text:style-name="P15">acessar os dados desse novo objecto com map()</text:p>
        </text:list-item>
        <text:list-item>
          <text:p text:style-name="P15">pegar o id do container</text:p>
        </text:list-item>
        <text:list-item>
          <text:p text:style-name="P15">Limpar o conteúdo do container</text:p>
        </text:list-item>
        <text:list-item>
          <text:p text:style-name="P15">inserir esses dados no container </text:p>
        </text:list-item>
      </text:list>
      <text:p text:style-name="P7"/>
      <text:p text:style-name="P1"><text:s/>Fim = &gt; Saida: <text:span text:style-name="T8">Categorias de filmes listadas</text:span></text:p>
      <text:p text:style-name="P7"/>
      <text:p text:style-name="P1">filtrarFilmes (arr){</text:p>
      <text:p text:style-name="P1">Inicio</text:p>
      <text:list xml:id="list210601171452555" text:continue-numbering="true" text:style-name="L6">
        <text:list-item>
          <text:p text:style-name="P15">Se o array for diferente de vazio</text:p>
        </text:list-item>
        <text:list-item>
          <text:p text:style-name="P15">Receber um array de objetos com filmes</text:p>
        </text:list-item>
        <text:list-item>
          <text:p text:style-name="P15">pegar o id do container do select</text:p>
        </text:list-item>
        <text:list-item>
          <text:p text:style-name="P15">pegar o valor do container do select</text:p>
        </text:list-item>
        <text:list-item>
          <text:p text:style-name="P15">acessar os dados desse objeto filmes com filter()</text:p>
        </text:list-item>
        <text:list-item>
          <text:p text:style-name="P15">filtrar todos os filmes que correspondem ao valor do select</text:p>
        </text:list-item>
        <text:list-item>
          <text:p text:style-name="P15">acessar os dados desse novo objeto com map()</text:p>
        </text:list-item>
        <text:list-item>
          <text:p text:style-name="P15">pegar o id do container</text:p>
        </text:list-item>
        <text:list-item>
          <text:p text:style-name="P15">limpar o conteúdo do container</text:p>
        </text:list-item>
        <text:list-item>
          <text:p text:style-name="P15">inserir esses dados no container </text:p>
        </text:list-item>
      </text:list>
      <text:p text:style-name="P7"/>
      <text:p text:style-name="P1"><text:s/>Fim = &gt; Saida: lista de <text:span text:style-name="T20">filmes</text:span></text:p>
      <text:p text:style-name="P1"/>
      <text:p text:style-name="P2"><text:span text:style-name="T21">ordenar</text:span>Filmes (arr){</text:p>
      <text:p text:style-name="P2">Inicio</text:p>
      <text:list xml:id="list210601523381789" text:continue-numbering="true" text:style-name="L6">
        <text:list-item>
          <text:p text:style-name="P16">Se o array for diferente de vazio</text:p>
        </text:list-item>
        <text:list-item>
          <text:p text:style-name="P16">Receber um array de objetos com filmes</text:p>
        </text:list-item>
        <text:list-item>
          <text:p text:style-name="P16">pegar o id do container do select</text:p>
        </text:list-item>
        <text:list-item>
          <text:p text:style-name="P16">pegar o valor do container do select</text:p>
        </text:list-item>
        <text:list-item>
          <text:p text:style-name="P16">acessar os dados desse objeto filmes <text:s/><text:span text:style-name="T26">ordenar </text:span>com <text:span text:style-name="T12">sort</text:span><text:span text:style-name="T10">()</text:span></text:p>
        </text:list-item>
        <text:list-item>
          <text:p text:style-name="P16"><text:span text:style-name="T22">ordenar</text:span> todos os filmes que correspondem ao valor do select</text:p>
        </text:list-item>
        <text:list-item>
          <text:p text:style-name="P18">Se for <text:span text:style-name="T10">(A-Z)</text:span> ordenar de forma ascendente</text:p>
        </text:list-item>
        <text:list-item>
          <text:p text:style-name="P19">Se for <text:span text:style-name="T10">(</text:span><text:span text:style-name="T11">Z</text:span><text:span text:style-name="T10">-</text:span><text:span text:style-name="T11">A</text:span><text:span text:style-name="T10">) </text:span>ordenar de forma <text:span text:style-name="T23">descente</text:span></text:p>
        </text:list-item>
        <text:list-item>
          <text:p text:style-name="P16">acessar os dados desse novo objeto com <text:span text:style-name="T10">map()</text:span></text:p>
        </text:list-item>
        <text:list-item>
          <text:p text:style-name="P16">pegar o id do container</text:p>
        </text:list-item>
        <text:list-item>
          <text:p text:style-name="P16"><text:soft-page-break/>limpar o conteúdo do container</text:p>
        </text:list-item>
        <text:list-item>
          <text:p text:style-name="P16">inserir esses dados no container </text:p>
        </text:list-item>
      </text:list>
      <text:p text:style-name="P8"/>
      <text:p text:style-name="P2"><text:s/>Fim = &gt; Saida: lista de <text:span text:style-name="T20">filmes </text:span><text:span text:style-name="T24">ordenada(ascendente, descendente</text:span><text:span text:style-name="T25">)</text:span></text:p>
      <text:p text:style-name="P7"/>
      <text:p text:style-name="P1">pesquisarFilmes (arr){</text:p>
      <text:p text:style-name="P1">Inicio</text:p>
      <text:list xml:id="list210601822066402" text:continue-numbering="true" text:style-name="L6">
        <text:list-item>
          <text:p text:style-name="P15">Se o array for diferente de vazio </text:p>
        </text:list-item>
        <text:list-item>
          <text:p text:style-name="P15">Receber um array de objetos com filmes</text:p>
        </text:list-item>
        <text:list-item>
          <text:p text:style-name="P15">pegar o id do container do input</text:p>
        </text:list-item>
        <text:list-item>
          <text:p text:style-name="P15">pegar o valor do input</text:p>
        </text:list-item>
        <text:list-item>
          <text:p text:style-name="P15">acessar os dados do objeto filmes com filter()</text:p>
        </text:list-item>
        <text:list-item>
          <text:p text:style-name="P15">filtrar todos os filmes que correspondem ao valor do input</text:p>
        </text:list-item>
        <text:list-item>
          <text:p text:style-name="P15">acessar os dados desse novo objeto com map()</text:p>
        </text:list-item>
        <text:list-item>
          <text:p text:style-name="P15">limitar a quantidade de dados acessados por 8</text:p>
        </text:list-item>
        <text:list-item>
          <text:p text:style-name="P15">pegar o id do container</text:p>
        </text:list-item>
        <text:list-item>
          <text:p text:style-name="P15">limpar o conteúdo do container</text:p>
        </text:list-item>
        <text:list-item>
          <text:p text:style-name="P15">inserir esses dados no container </text:p>
        </text:list-item>
      </text:list>
      <text:p text:style-name="P7"/>
      <text:p text:style-name="P1"><text:s/>Fim = &gt; Saida: lista de filmes sorteados() e mapeados()</text:p>
      <text:p text:style-name="P7"/>
      <text:p text:style-name="P1">verDetalhesDeFilme (id, arr){</text:p>
      <text:p text:style-name="P1">Inicio</text:p>
      <text:list xml:id="list210602167431523" text:continue-numbering="true" text:style-name="L6">
        <text:list-item>
          <text:p text:style-name="P15">Se o array for diferente de vazio</text:p>
        </text:list-item>
        <text:list-item>
          <text:p text:style-name="P15">Receber um array de objetos com filmes</text:p>
        </text:list-item>
        <text:list-item>
          <text:p text:style-name="P15">Receber um id do obj filme</text:p>
        </text:list-item>
        <text:list-item>
          <text:p text:style-name="P15">pegar o id do container do input</text:p>
        </text:list-item>
        <text:list-item>
          <text:p text:style-name="P15">pegar o valor do input</text:p>
        </text:list-item>
        <text:list-item>
          <text:p text:style-name="P15">acessar os dados do objeto filmes com filter()</text:p>
        </text:list-item>
        <text:list-item>
          <text:p text:style-name="P15">filtrar o os dados do filme que correspondem ao id do filme</text:p>
        </text:list-item>
        <text:list-item>
          <text:p text:style-name="P15">acessar os dados desse novo objeto com map()</text:p>
        </text:list-item>
        <text:list-item>
          <text:p text:style-name="P15">pegar o id do container</text:p>
        </text:list-item>
        <text:list-item>
          <text:p text:style-name="P15">limpar o conteúdo do container</text:p>
        </text:list-item>
        <text:list-item>
          <text:p text:style-name="P15">inserir esses dados no container </text:p>
        </text:list-item>
      </text:list>
      <text:p text:style-name="P1">} <text:s text:c="3"/>Fim = &gt; Saida: object com detalhe de filme expecific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<text:span text:style-name="T27">adicionarFilmesAoCart</text:span> (id<text:span text:style-name="T27">Filme</text:span>, <text:s/><text:span text:style-name="T27">listaFilmes</text:span>){</text:p>
      <text:p text:style-name="P22">Inicio</text:p>
      <text:list xml:id="list210602591515640" text:continue-numbering="true" text:style-name="L6">
        <text:list-item>
          <text:p text:style-name="P17">Receber um array de objetos com filmes</text:p>
        </text:list-item>
        <text:list-item>
          <text:p text:style-name="P20">Verificar se o id do filme existe dentro do carrinho</text:p>
        </text:list-item>
        <text:list-item>
          <text:p text:style-name="P20">Se existir não adicionar o id ao cart </text:p>
        </text:list-item>
        <text:list-item>
          <text:p text:style-name="P20"/>
        </text:list-item>
        <text:list-item>
          <text:p text:style-name="P17">pegar o id do container do input</text:p>
        </text:list-item>
        <text:list-item>
          <text:p text:style-name="P17">pegar o valor do input</text:p>
        </text:list-item>
        <text:list-item>
          <text:p text:style-name="P17">acessar os dados do objeto filmes com filter()</text:p>
        </text:list-item>
        <text:list-item>
          <text:p text:style-name="P17">filtrar o os dados do filme que correspondem ao id do filme</text:p>
        </text:list-item>
        <text:list-item>
          <text:p text:style-name="P17">acessar os dados desse novo objeto com map()</text:p>
        </text:list-item>
        <text:list-item>
          <text:p text:style-name="P17">pegar o id do container</text:p>
        </text:list-item>
        <text:list-item>
          <text:p text:style-name="P17">limpar o conteúdo do container</text:p>
        </text:list-item>
        <text:list-item>
          <text:p text:style-name="P17">inserir esses dados no container </text:p>
        </text:list-item>
      </text:list>
      <text:p text:style-name="P22">} <text:s text:c="3"/>Fim = &gt; Saida: object com detalhe de filme expecifico</text:p>
      <text:p text:style-name="P2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20:11:20.331771015</meta:creation-date>
    <dc:date>2026-05-20T21:05:37.232968678</dc:date>
    <meta:editing-duration>PT6H29M2S</meta:editing-duration>
    <meta:editing-cycles>16</meta:editing-cycles>
    <meta:generator>LibreOffice/7.4.7.2$Linux_X86_64 LibreOffice_project/40$Build-2</meta:generator>
    <meta:document-statistic meta:table-count="0" meta:image-count="1" meta:object-count="0" meta:page-count="6" meta:paragraph-count="159" meta:word-count="1345" meta:character-count="7293" meta:non-whitespace-character-count="6169"/>
  </office:meta>
</office:document-meta>
</file>